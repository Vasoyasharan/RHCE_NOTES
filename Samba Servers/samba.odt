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2000000AC89319736.png" manifest:media-type="image/png"/>
  <manifest:file-entry manifest:full-path="Pictures/100000010000068C0000042186CDC47C.png" manifest:media-type="image/png"/>
  <manifest:file-entry manifest:full-path="Pictures/100000010000078000000223EB0C7428.png" manifest:media-type="image/png"/>
  <manifest:file-entry manifest:full-path="Pictures/100000010000077D000003C80F28E9EA.png" manifest:media-type="image/png"/>
  <manifest:file-entry manifest:full-path="Pictures/10000000000002B7000002A2353895F3.png" manifest:media-type="image/png"/>
  <manifest:file-entry manifest:full-path="Pictures/10000001000002F2000000AC683CE2D5.png" manifest:media-type="image/png"/>
  <manifest:file-entry manifest:full-path="Pictures/1000000100000780000001324361FAB6.png" manifest:media-type="image/png"/>
  <manifest:file-entry manifest:full-path="Pictures/1000000100000780000001A987AABE4C.png" manifest:media-type="image/png"/>
  <manifest:file-entry manifest:full-path="Pictures/1000000000000523000003977242F1E5.png" manifest:media-type="image/png"/>
  <manifest:file-entry manifest:full-path="Pictures/10000001000007800000035669B91257.png" manifest:media-type="image/png"/>
  <manifest:file-entry manifest:full-path="Pictures/100000010000078000000356C9345594.png" manifest:media-type="image/png"/>
  <manifest:file-entry manifest:full-path="Pictures/1000000100000780000002BC77172A44.png" manifest:media-type="image/png"/>
  <manifest:file-entry manifest:full-path="Pictures/10000001000007800000030E5C1A67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d8ba" officeooo:paragraph-rsid="0008d8ba"/>
    </style:style>
    <style:style style:name="P2" style:family="paragraph" style:parent-style-name="Standard">
      <style:text-properties officeooo:rsid="000ab4a8" officeooo:paragraph-rsid="000ab4a8"/>
    </style:style>
    <style:style style:name="P3" style:family="paragraph" style:parent-style-name="Standard">
      <style:text-properties fo:font-weight="bold" officeooo:rsid="000be975" officeooo:paragraph-rsid="000be975" style:font-weight-asian="bold" style:font-weight-complex="bold"/>
    </style:style>
    <style:style style:name="P4" style:family="paragraph" style:parent-style-name="Standard">
      <style:text-properties fo:font-weight="bold" officeooo:rsid="000e4506" officeooo:paragraph-rsid="000e4506" style:font-weight-asian="bold" style:font-weight-complex="bold"/>
    </style:style>
    <style:style style:name="P5" style:family="paragraph" style:parent-style-name="Standard">
      <style:text-properties fo:font-weight="bold" officeooo:rsid="00109cd0" officeooo:paragraph-rsid="00109cd0" style:font-weight-asian="bold" style:font-weight-complex="bold"/>
    </style:style>
    <style:style style:name="P6" style:family="paragraph" style:parent-style-name="Standard">
      <style:text-properties fo:font-size="11pt" fo:font-weight="bold" officeooo:rsid="00109cd0" officeooo:paragraph-rsid="00109cd0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rsid="0012746e" officeooo:paragraph-rsid="0012746e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rsid="0015e326" officeooo:paragraph-rsid="0015e326" style:font-size-asian="11pt" style:font-weight-asian="bold" style:font-size-complex="11pt" style:font-weight-complex="bold"/>
    </style:style>
    <style:style style:name="T1" style:family="text">
      <style:text-properties officeooo:rsid="00141eb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6929in" svg:height="2.7256in" draw:z-index="0"><draw:image xlink:href="Pictures/10000001000007800000030E5C1A67DD.png" xlink:type="simple" xlink:show="embed" xlink:actuate="onLoad" draw:mime-type="image/png"/></draw:frame></text:p>
      <text:p text:style-name="P2"><draw:frame draw:style-name="fr1" draw:name="Image2" text:anchor-type="char" svg:width="6.6929in" svg:height="2.9764in" draw:z-index="1"><draw:image xlink:href="Pictures/100000010000078000000356C9345594.png" xlink:type="simple" xlink:show="embed" xlink:actuate="onLoad" draw:mime-type="image/png"/></draw:frame></text:p>
      <text:p text:style-name="P2"><draw:frame draw:style-name="fr1" draw:name="Image3" text:anchor-type="char" svg:width="6.6929in" svg:height="2.9764in" draw:z-index="2"><draw:image xlink:href="Pictures/10000001000007800000035669B91257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4" text:anchor-type="char" svg:width="6.6929in" svg:height="1.0665in" draw:z-index="3"><draw:image xlink:href="Pictures/1000000100000780000001324361FAB6.png" xlink:type="simple" xlink:show="embed" xlink:actuate="onLoad" draw:mime-type="image/png"/></draw:frame><text:soft-page-break/></text:p>
      <text:p text:style-name="P2">[samba-share]</text:p>
      <text:p text:style-name="P2"><text:tab/>path = /samba-share</text:p>
      <text:p text:style-name="P2"><text:tab/>comment = This Is Samba Share Server</text:p>
      <text:p text:style-name="P2"><text:tab/>writable = yes</text:p>
      <text:p text:style-name="P2"><text:tab/>guest ok = no</text:p>
      <text:p text:style-name="P3">Linux to Window Verification:</text:p>
      <text:p text:style-name="P3"><draw:frame draw:style-name="fr3" draw:name="Image7" text:anchor-type="char" svg:width="5.5992in" svg:height="5.4299in" draw:z-index="6"><draw:image xlink:href="Pictures/10000000000002B7000002A2353895F3.png" xlink:type="simple" xlink:show="embed" xlink:actuate="onLoad" draw:mime-type="image/png"/></draw:frame></text:p>
      <text:p text:style-name="P3"><draw:frame draw:style-name="fr2" draw:name="Image6" text:anchor-type="char" svg:width="6.6929in" svg:height="4.6772in" draw:z-index="5"><draw:image xlink:href="Pictures/1000000000000523000003977242F1E5.png" xlink:type="simple" xlink:show="embed" xlink:actuate="onLoad" draw:mime-type="image/png"/></draw:frame><text:soft-page-break/></text:p>
      <text:p text:style-name="P3">linux to linux Verification:</text:p>
      <text:p text:style-name="P4"><draw:frame draw:style-name="fr1" draw:name="Image5" text:anchor-type="char" svg:width="6.6929in" svg:height="2.4398in" draw:z-index="4"><draw:image xlink:href="Pictures/1000000100000780000002BC77172A44.png" xlink:type="simple" xlink:show="embed" xlink:actuate="onLoad" draw:mime-type="image/png"/></draw:frame></text:p>
      <text:p text:style-name="P4"><draw:frame draw:style-name="fr1" draw:name="Image9" text:anchor-type="char" svg:width="6.6929in" svg:height="1.9063in" draw:z-index="8"><draw:image xlink:href="Pictures/100000010000078000000223EB0C7428.png" xlink:type="simple" xlink:show="embed" xlink:actuate="onLoad" draw:mime-type="image/png"/></draw:frame></text:p>
      <text:p text:style-name="P5"><draw:frame draw:style-name="fr2" draw:name="Image8" text:anchor-type="char" svg:width="6.6929in" svg:height="4.2209in" draw:z-index="7"><draw:image xlink:href="Pictures/100000010000068C0000042186CDC47C.png" xlink:type="simple" xlink:show="embed" xlink:actuate="onLoad" draw:mime-type="image/png"/></draw:frame><text:soft-page-break/></text:p>
      <text:p text:style-name="P5"/>
      <text:p text:style-name="P5"><draw:frame draw:style-name="fr2" draw:name="Image10" text:anchor-type="char" svg:width="6.6929in" svg:height="3.3791in" draw:z-index="9"><draw:image xlink:href="Pictures/100000010000077D000003C80F28E9EA.png" xlink:type="simple" xlink:show="embed" xlink:actuate="onLoad" draw:mime-type="image/png"/></draw:frame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vi /etc/samba/smb.conf</text:p>
      <text:p text:style-name="P5"/>
      <text:p text:style-name="P6">[hr]</text:p>
      <text:p text:style-name="P6"><text:s text:c="8"/>path = /samba-share/hr</text:p>
      <text:p text:style-name="P6"><text:s text:c="8"/>valid users = @hr</text:p>
      <text:p text:style-name="P6"><text:s text:c="8"/>writable = yes</text:p>
      <text:p text:style-name="P6"><text:s text:c="8"/>browseable = yes</text:p>
      <text:p text:style-name="P6"><text:s text:c="8"/>create mask = 0770</text:p>
      <text:p text:style-name="P6"><text:s text:c="8"/>directory mask = 2770</text:p>
      <text:p text:style-name="P6"/>
      <text:p text:style-name="P6">[iit] <text:s/></text:p>
      <text:p text:style-name="P6"><text:s text:c="8"/>path = /samba-share/iit</text:p>
      <text:p text:style-name="P6"><text:s text:c="8"/>valid users = @iit</text:p>
      <text:p text:style-name="P6"><text:s text:c="8"/>writable = yes</text:p>
      <text:p text:style-name="P6"><text:s text:c="8"/>browseable = yes</text:p>
      <text:p text:style-name="P6"><text:s text:c="8"/>create mask = 0770</text:p>
      <text:p text:style-name="P6"><text:s text:c="8"/>directory mask = 2770</text:p>
      <text:p text:style-name="P6"/>
      <text:p text:style-name="P6">[finance]</text:p>
      <text:p text:style-name="P6"><text:s text:c="8"/>path = /samba-share/finance</text:p>
      <text:p text:style-name="P6"><text:s text:c="8"/>valid users = @finance</text:p>
      <text:p text:style-name="P6"><text:s text:c="8"/>writable = yes</text:p>
      <text:p text:style-name="P6"><text:s text:c="8"/>browseable = yes</text:p>
      <text:p text:style-name="P6"><text:s text:c="8"/>create mask = 0770</text:p>
      <text:p text:style-name="P6"><text:s text:c="8"/>directory mask = 2770</text:p>
      <text:p text:style-name="P6"/>
      <text:p text:style-name="P7">Verification HR:</text:p>
      <text:p text:style-name="P8"><draw:frame draw:style-name="fr1" draw:name="Image11" text:anchor-type="char" svg:width="6.6929in" svg:height="1.4811in" draw:z-index="10"><draw:image xlink:href="Pictures/1000000100000780000001A987AABE4C.png" xlink:type="simple" xlink:show="embed" xlink:actuate="onLoad" draw:mime-type="image/png"/></draw:frame></text:p>
      <text:p text:style-name="P8"><draw:frame draw:style-name="fr1" draw:name="Image13" text:anchor-type="char" svg:width="6.6929in" svg:height="1.5264in" draw:z-index="12"><draw:image xlink:href="Pictures/10000001000002F2000000AC89319736.png" xlink:type="simple" xlink:show="embed" xlink:actuate="onLoad" draw:mime-type="image/png"/></draw:frame></text:p>
      <text:p text:style-name="P8"><draw:frame draw:style-name="fr1" draw:name="Image12" text:anchor-type="char" svg:width="6.6929in" svg:height="1.5264in" draw:z-index="11"><draw:image xlink:href="Pictures/10000001000002F2000000AC683CE2D5.png" xlink:type="simple" xlink:show="embed" xlink:actuate="onLoad" draw:mime-type="image/png"/></draw:frame></text:p>
      <text:p text:style-name="P8"/>
      <text:p text:style-name="P8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7T07:42:23.739337794</meta:creation-date>
    <dc:date>2026-04-28T07:58:48.201954002</dc:date>
    <meta:editing-duration>PT1H5M12S</meta:editing-duration>
    <meta:editing-cycles>11</meta:editing-cycles>
    <meta:generator>LibreOffice/24.2.7.2$Linux_X86_64 LibreOffice_project/420$Build-2</meta:generator>
    <meta:document-statistic meta:table-count="0" meta:image-count="13" meta:object-count="0" meta:page-count="6" meta:paragraph-count="31" meta:word-count="96" meta:character-count="695" meta:non-whitespace-character-count="478"/>
  </office:meta>
</office:document-meta>
</file>